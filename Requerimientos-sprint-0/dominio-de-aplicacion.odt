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1643fd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1643fd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1643fd" style:font-weight-asian="normal" style:font-weight-complex="normal"/>
    </style:style>
    <style:style style:name="P4" style:family="paragraph" style:parent-style-name="Standard" style:list-style-name="L1">
      <style:text-properties fo:font-weight="bold" officeooo:rsid="001643fd" officeooo:paragraph-rsid="001643fd" style:font-weight-asian="bold" style:font-weight-complex="bold"/>
    </style:style>
    <style:style style:name="P5" style:family="paragraph" style:parent-style-name="Standard" style:list-style-name="L1">
      <style:text-properties fo:font-style="italic" officeooo:rsid="001643fd" officeooo:paragraph-rsid="001643fd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inio de aplicacion:</text:p>
      <text:p text:style-name="P1">Venta de Componentes de PC</text:p>
      <text:p text:style-name="P2"/>
      <text:p text:style-name="P2">Descripcion</text:p>
      <text:p text:style-name="P3">Una pagina web de e-commerce destinada a la venta de componentes de computadora y accesorios.</text:p>
      <text:p text:style-name="P2"/>
      <text:list text:style-name="L1">
        <text:list-header>
          <text:p text:style-name="P4">Ejemplos reales: </text:p>
        </text:list-header>
        <text:list-item>
          <text:p text:style-name="P5">compragamer.com</text:p>
        </text:list-item>
        <text:list-item>
          <text:p text:style-name="P5">fullh4rd.com.ar</text:p>
        </text:list-item>
        <text:list-item>
          <text:p text:style-name="P5">mexx.com.ar</text:p>
        </text:list-item>
        <text:list-item>
          <text:p text:style-name="P5">maximus.com.a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9:45:43.988877000</meta:creation-date>
    <dc:date>2026-06-01T19:54:18.163814000</dc:date>
    <meta:editing-duration>PT8M35S</meta:editing-duration>
    <meta:editing-cycles>1</meta:editing-cycles>
    <meta:document-statistic meta:table-count="0" meta:image-count="0" meta:object-count="0" meta:page-count="1" meta:paragraph-count="9" meta:word-count="35" meta:character-count="229" meta:non-whitespace-character-count="207"/>
    <meta:generator>LibreOffice/26.2.2.2$MacOSX_AARCH64 LibreOffice_project/1f77d10d6938fd34972958f64b2bcfa54f8b1ba5</meta:generator>
  </office:meta>
</office:document-meta>
</file>